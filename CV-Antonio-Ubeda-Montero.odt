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0A2000000DAAECA5EE3.jpg" manifest:media-type="image/jpe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6.399cm" table:align="left"/>
    </style:style>
    <style:style style:name="Table1.A" style:family="table-column">
      <style:table-column-properties style:column-width="11.543cm"/>
    </style:style>
    <style:style style:name="Table1.B" style:family="table-column">
      <style:table-column-properties style:column-width="4.856cm"/>
    </style:style>
    <style:style style:name="Table1.1" style:family="table-row">
      <style:table-row-properties style:min-row-height="0.885cm"/>
    </style:style>
    <style:style style:name="Table1.A1" style:family="table-cell">
      <style:table-cell-properties style:vertical-align="middle" fo:background-color="#1e88e5" fo:padding="0.049cm" fo:border="none">
        <style:background-image/>
      </style:table-cell-properties>
    </style:style>
    <style:style style:name="Table1.B1" style:family="table-cell">
      <style:table-cell-properties style:vertical-align="middle" fo:padding="0.049cm" fo:border="none"/>
    </style:style>
    <style:style style:name="Table1.2" style:family="table-row">
      <style:table-row-properties style:min-row-height="0.817cm"/>
    </style:style>
    <style:style style:name="Table1.B2" style:family="table-cell">
      <style:table-cell-properties style:vertical-align="middle" fo:padding="0.049cm" fo:border="none"/>
    </style:style>
    <style:style style:name="Table1.3" style:family="table-row">
      <style:table-row-properties style:min-row-height="0.702cm"/>
    </style:style>
    <style:style style:name="Table1.B3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5.398cm"/>
    </style:style>
    <style:style style:name="Table2.B" style:family="table-column">
      <style:table-column-properties style:column-width="11.603cm"/>
    </style:style>
    <style:style style:name="Table2.1" style:family="table-row">
      <style:table-row-properties style:min-row-height="0.84cm"/>
    </style:style>
    <style:style style:name="Table2.A1" style:family="table-cell">
      <style:table-cell-properties style:vertical-align="middle" fo:background-color="#2196f3" fo:padding="0.049cm" fo:border="none">
        <style:background-image/>
      </style:table-cell-properties>
    </style:style>
    <style:style style:name="Table2.A2" style:family="table-cell">
      <style:table-cell-properties style:vertical-align="middle" fo:background-color="#eceff1" fo:padding="0.049cm" fo:border="none">
        <style:background-image/>
      </style:table-cell-properties>
    </style:style>
    <style:style style:name="P1" style:family="paragraph" style:parent-style-name="Heading_20_3">
      <style:paragraph-properties fo:margin-top="0cm" fo:margin-bottom="0cm" style:contextual-spacing="false"/>
    </style:style>
    <style:style style:name="P2" style:family="paragraph" style:parent-style-name="Text_20_body">
      <style:paragraph-properties fo:margin-top="0cm" fo:margin-bottom="0cm" style:contextual-spacing="false"/>
    </style:style>
    <style:style style:name="P3" style:family="paragraph" style:parent-style-name="Table_20_Contents">
      <style:text-properties officeooo:paragraph-rsid="001c7120"/>
    </style:style>
    <style:style style:name="P4" style:family="paragraph" style:parent-style-name="Heading_20_2">
      <style:paragraph-properties fo:margin-top="0.349cm" fo:margin-bottom="0.349cm" style:contextual-spacing="false"/>
    </style:style>
    <style:style style:name="P5" style:family="paragraph" style:parent-style-name="Heading_20_2">
      <style:paragraph-properties fo:margin-top="0.349cm" fo:margin-bottom="0.45cm" style:contextual-spacing="false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Heading_20_2">
      <style:paragraph-properties fo:margin-top="0.45cm" fo:margin-bottom="0.349cm" style:contextual-spacing="false"/>
      <style:text-properties officeooo:paragraph-rsid="001d87e9"/>
    </style:style>
    <style:style style:name="P10" style:family="paragraph" style:parent-style-name="Text_20_body" style:list-style-name="L1">
      <style:paragraph-properties fo:margin-top="0cm" fo:margin-bottom="0cm" style:contextual-spacing="false"/>
    </style:style>
    <style:style style:name="P11" style:family="paragraph" style:parent-style-name="Text_20_body" style:list-style-name="L2">
      <style:paragraph-properties fo:margin-top="0cm" fo:margin-bottom="0cm" style:contextual-spacing="false"/>
    </style:style>
    <style:style style:name="P12" style:family="paragraph" style:parent-style-name="Text_20_body" style:list-style-name="L3">
      <style:paragraph-properties fo:margin-top="0cm" fo:margin-bottom="0cm" style:contextual-spacing="false"/>
    </style:style>
    <style:style style:name="P13" style:family="paragraph" style:parent-style-name="Text_20_body" style:list-style-name="L4">
      <style:text-properties officeooo:paragraph-rsid="005eb424"/>
    </style:style>
    <style:style style:name="P14" style:family="paragraph" style:parent-style-name="Text_20_body" style:list-style-name="L1">
      <style:text-properties officeooo:paragraph-rsid="005eb424"/>
    </style:style>
    <style:style style:name="P15" style:family="paragraph" style:parent-style-name="Heading_20_2">
      <style:text-properties officeooo:paragraph-rsid="001d87e9"/>
    </style:style>
    <style:style style:name="P16" style:family="paragraph" style:parent-style-name="Heading_20_3">
      <style:text-properties style:text-underline-style="solid" style:text-underline-width="auto" style:text-underline-color="font-color"/>
    </style:style>
    <style:style style:name="P17" style:family="paragraph" style:parent-style-name="Heading_20_4">
      <style:text-properties style:font-name="Liberation Sans" officeooo:rsid="0079d60f" officeooo:paragraph-rsid="0079d60f" style:font-name-asian="PingFang SC" style:font-name-complex="Arial Unicode MS1"/>
    </style:style>
    <style:style style:name="P18" style:family="paragraph" style:parent-style-name="Text_20_body" style:list-style-name="L5">
      <style:paragraph-properties fo:margin-top="0cm" fo:margin-bottom="0cm" style:contextual-spacing="false"/>
      <style:text-properties officeooo:paragraph-rsid="0079d60f"/>
    </style:style>
    <style:style style:name="P19" style:family="paragraph" style:parent-style-name="Heading_20_4">
      <style:text-properties style:font-name="Liberation Sans" style:font-name-asian="PingFang SC" style:font-name-complex="Arial Unicode MS1"/>
    </style:style>
    <style:style style:name="P20" style:family="paragraph" style:parent-style-name="Text_20_body" style:list-style-name="L6">
      <style:paragraph-properties fo:margin-top="0cm" fo:margin-bottom="0cm" style:contextual-spacing="false"/>
    </style:style>
    <style:style style:name="P21" style:family="paragraph" style:parent-style-name="Text_20_body" style:list-style-name="L5">
      <style:paragraph-properties fo:margin-top="0cm" fo:margin-bottom="0cm" style:contextual-spacing="false"/>
    </style:style>
    <style:style style:name="P22" style:family="paragraph" style:parent-style-name="Text_20_body" style:list-style-name="L7">
      <style:paragraph-properties fo:margin-top="0cm" fo:margin-bottom="0cm" style:contextual-spacing="false"/>
    </style:style>
    <style:style style:name="P23" style:family="paragraph" style:parent-style-name="Text_20_body" style:list-style-name="L7">
      <style:paragraph-properties fo:margin-top="0cm" fo:margin-bottom="0cm" style:contextual-spacing="false"/>
      <style:text-properties fo:font-weight="bold"/>
    </style:style>
    <style:style style:name="P24" style:family="paragraph" style:parent-style-name="Text_20_body" style:list-style-name="L8">
      <style:paragraph-properties fo:margin-top="0cm" fo:margin-bottom="0cm" style:contextual-spacing="false"/>
    </style:style>
    <style:style style:name="P25" style:family="paragraph" style:parent-style-name="Text_20_body" style:list-style-name="L9">
      <style:paragraph-properties fo:margin-top="0cm" fo:margin-bottom="0cm" style:contextual-spacing="false"/>
    </style:style>
    <style:style style:name="P26" style:family="paragraph" style:parent-style-name="Text_20_body" style:list-style-name="L10">
      <style:paragraph-properties fo:margin-top="0cm" fo:margin-bottom="0cm" style:contextual-spacing="false"/>
    </style:style>
    <style:style style:name="P27" style:family="paragraph" style:parent-style-name="Heading_20_2">
      <style:paragraph-properties fo:margin-top="0.349cm" fo:margin-bottom="0.31cm" style:contextual-spacing="false"/>
    </style:style>
    <style:style style:name="P28" style:family="paragraph" style:parent-style-name="Text_20_body" style:list-style-name="L11">
      <style:paragraph-properties fo:margin-top="0cm" fo:margin-bottom="0cm" style:contextual-spacing="false"/>
    </style:style>
    <style:style style:name="P29" style:family="paragraph" style:parent-style-name="Text_20_body" style:list-style-name="L12">
      <style:paragraph-properties fo:margin-top="0cm" fo:margin-bottom="0cm" style:contextual-spacing="false"/>
    </style:style>
    <style:style style:name="P30" style:family="paragraph" style:parent-style-name="Table_20_Contents">
      <style:text-properties officeooo:rsid="001d87e9" officeooo:paragraph-rsid="001d87e9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bold"/>
    </style:style>
    <style:style style:name="T5" style:family="text">
      <style:text-properties fo:color="#ffffff" loext:opacity="100%"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6e5f50" style:font-weight-asian="normal" style:font-weight-complex="normal"/>
    </style:style>
    <style:style style:name="T10" style:family="text">
      <style:text-properties officeooo:rsid="001d87e9"/>
    </style:style>
    <style:style style:name="T11" style:family="text">
      <style:text-properties style:text-underline-style="solid" style:text-underline-width="auto" style:text-underline-color="font-color" officeooo:rsid="001d87e9"/>
    </style:style>
    <style:style style:name="T12" style:family="text">
      <style:text-properties officeooo:rsid="0079d60f"/>
    </style:style>
    <style:style style:name="T13" style:family="text">
      <style:text-properties fo:font-weight="bold" officeooo:rsid="0079d60f" style:font-weight-asian="bold" style:font-weight-complex="bold"/>
    </style:style>
    <style:style style:name="T14" style:family="text">
      <style:text-properties fo:font-weight="normal" officeooo:rsid="0079d60f" style:font-weight-asian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tab/><text:tab/><text:tab/><text:tab/><text:span text:style-name="T1">ANTONIO ÚBEDA MONTERO</text:span></text:h>
      <text:h text:style-name="P1" text:outline-level="3"><text:tab/><text:tab/> <text:s text:c="4"/><text:tab/><text:span text:style-name="T2">Desarrollador Web Senior (Angular &amp; TypeScript)</text:span></text:h>
      <text:p text:style-name="P2"><text:span text:style-name="T3"/>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Table_20_Contents"><text:s/>📞 <text:s/><text:span text:style-name="T4">Teléfono:</text:span> 617 84 40 85</text:p>
            </table:table-cell>
            <table:table-cell table:style-name="Table1.B1" table:number-rows-spanned="3" office:value-type="string">
              <text:p text:style-name="Table_20_Contents"><draw:frame draw:style-name="fr1" draw:name="Image1" text:anchor-type="char" svg:x="1.833cm" svg:y="0.182cm" svg:width="1.85cm" svg:height="2.057cm" draw:z-index="0"><draw:image xlink:href="Pictures/10000000000000A2000000DAAECA5EE3.jpg" xlink:type="simple" xlink:show="embed" xlink:actuate="onLoad" draw:mime-type="image/jpeg"/></draw:frame></text:p>
            </table:table-cell>
          </table:table-row>
        </table:table-header-rows>
        <table:table-row table:style-name="Table1.2">
          <table:table-cell table:style-name="Table1.A1" office:value-type="string">
            <text:p text:style-name="Table_20_Contents"><text:s/>📧 <text:s/><text:span text:style-name="T4">Email:</text:span> anubedam@gmail.com</text:p>
          </table:table-cell>
          <table:covered-table-cell table:style-name="Table1.B1"/>
        </table:table-row>
        <table:table-row table:style-name="Table1.3">
          <table:table-cell table:style-name="Table1.A1" office:value-type="string">
            <text:p text:style-name="P3"><text:s/>🌐 <text:s/><text:span text:style-name="T4">Web / Portfolio:</text:span> <text:a xlink:type="simple" xlink:href="https://www.antonioubedamontero.com/" office:target-frame-name="_blank" xlink:show="new" text:style-name="Internet_20_link" text:visited-style-name="Visited_20_Internet_20_Link"><text:span text:style-name="T5">https://www.antonioubedamontero.com/</text:span></text:a></text:p>
          </table:table-cell>
          <table:covered-table-cell table:style-name="Table1.B1"/>
        </table:table-row>
      </table:table>
      <text:h text:style-name="P4" text:outline-level="2">🎯 <text:span text:style-name="T6">Resumen Profesional</text:span></text:h>
      <text:p text:style-name="Text_20_body">Frontend Senior especializado en <text:span text:style-name="T7">Angular (v20) </text:span>y desarrollo de aplicaciones de alto rendimiento. Más de 20 años creando productos robustos, accesibles y optimizados, con experiencia en proyectos de alta criticidad para Banco Santander y Segur Caixa. Trabajo con arquitectura moderna (<text:span text:style-name="T7">micro-frontends</text:span>, <text:span text:style-name="T7">Signals</text:span>), buenas prácticas (<text:span text:style-name="T7">Clean Code</text:span>, <text:span text:style-name="T7">patrones</text:span>) y <text:span text:style-name="T7">metodologías ágiles</text:span>. Mantengo actualización continua en <text:span text:style-name="T7">React</text:span>, <text:span text:style-name="T7">TypeScript</text:span> y <text:span text:style-name="T7">Tailwind</text:span> para ampliar versatilidad tecnológica.</text:p>
      <text:h text:style-name="P5" text:outline-level="2">🛠️ <text:span text:style-name="T6">Habilidades Técnicas</text:span></text:h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6">Grupo de Habilidades</text:p>
            </table:table-cell>
            <table:table-cell table:style-name="Table2.A1" office:value-type="string">
              <text:p text:style-name="P6">Herramientas y Frameworks</text:p>
            </table:table-cell>
          </table:table-row>
        </table:table-header-rows>
        <table:table-row>
          <table:table-cell table:style-name="Table2.A2" office:value-type="string">
            <text:p text:style-name="P7">Frontend &amp; Angular</text:p>
          </table:table-cell>
          <table:table-cell table:style-name="Table2.A2" office:value-type="string">
            <text:p text:style-name="P8"><text:span text:style-name="T4">Angular</text:span> (v20 con <text:span text:style-name="T4">Señales</text:span>), <text:span text:style-name="T4">TypeScript</text:span>, <text:span text:style-name="T7">RxJS</text:span>, <text:span text:style-name="T7">HTML5</text:span> Semántico y SEO, <text:span text:style-name="T7">CSS3</text:span>, <text:span text:style-name="T7">SASS (BEM)</text:span>.</text:p>
          </table:table-cell>
        </table:table-row>
        <table:table-row>
          <table:table-cell table:style-name="Table2.A2" office:value-type="string">
            <text:p text:style-name="P7">Testing &amp; Calidad</text:p>
          </table:table-cell>
          <table:table-cell table:style-name="Table2.A2" office:value-type="string">
            <text:p text:style-name="P8"><text:span text:style-name="T7">Jasmine</text:span> y <text:span text:style-name="T7">Karma</text:span>, <text:span text:style-name="T4">Clean Code</text:span>, <text:span text:style-name="T4">Patrones de Diseño</text:span>.</text:p>
          </table:table-cell>
        </table:table-row>
        <table:table-row>
          <table:table-cell table:style-name="Table2.A2" office:value-type="string">
            <text:p text:style-name="P7">UI/UX &amp; Estilos</text:p>
          </table:table-cell>
          <table:table-cell table:style-name="Table2.A2" office:value-type="string">
            <text:p text:style-name="P8"><text:span text:style-name="T7">Diseño Responsive</text:span> (Flexbox/CSS Grid), <text:span text:style-name="T7">Angular Material</text:span>, <text:span text:style-name="T7">Bootstrap</text:span><text:span text:style-name="T8">.</text:span><text:span text:style-name="T9"> </text:span></text:p>
          </table:table-cell>
        </table:table-row>
        <table:table-row>
          <table:table-cell table:style-name="Table2.A2" office:value-type="string">
            <text:p text:style-name="P7">Infraestructura &amp; DevOps</text:p>
          </table:table-cell>
          <table:table-cell table:style-name="Table2.A2" office:value-type="string">
            <text:p text:style-name="P8">Contenerización con <text:span text:style-name="T4">Docker</text:span> y despliegue con <text:span text:style-name="T4">Jenkins</text:span>. <text:span text:style-name="T7">GIT</text:span> (Versionado Semántico).</text:p>
          </table:table-cell>
        </table:table-row>
        <table:table-row>
          <table:table-cell table:style-name="Table2.A2" office:value-type="string">
            <text:p text:style-name="P7">Backend &amp; BBDD</text:p>
          </table:table-cell>
          <table:table-cell table:style-name="Table2.A2" office:value-type="string">
            <text:p text:style-name="P8"><text:span text:style-name="T4">Node.js</text:span>, <text:span text:style-name="T7">JQuery</text:span>. Bases de Datos: <text:span text:style-name="T7">MongoDB</text:span>, <text:span text:style-name="T7">My-SQL / Maria-DB</text:span>, <text:span text:style-name="T7">Oracle</text:span>.</text:p>
          </table:table-cell>
        </table:table-row>
        <table:table-row>
          <table:table-cell table:style-name="Table2.A2" office:value-type="string">
            <text:p text:style-name="P7">Metodologías</text:p>
          </table:table-cell>
          <table:table-cell table:style-name="Table2.A2" office:value-type="string">
            <text:p text:style-name="P8"><text:span text:style-name="T4">SCRUM</text:span> y <text:span text:style-name="T4">LEAN</text:span> (Metodologías Ágiles).</text:p>
          </table:table-cell>
        </table:table-row>
        <table:table-row>
          <table:table-cell table:style-name="Table2.A2" office:value-type="string">
            <text:p text:style-name="P7">Legacy Systems</text:p>
          </table:table-cell>
          <table:table-cell table:style-name="Table2.A2" office:value-type="string">
            <text:p text:style-name="P8"><text:span text:style-name="T7">COBOL</text:span>, <text:span text:style-name="T7">CICS</text:span>, <text:span text:style-name="T7">DB2</text:span> y <text:span text:style-name="T7">JCL</text:span>.</text:p>
          </table:table-cell>
        </table:table-row>
        <table:table-row>
          <table:table-cell table:style-name="Table2.A2" office:value-type="string">
            <text:p text:style-name="P7">Aprendizaje Activo</text:p>
          </table:table-cell>
          <table:table-cell table:style-name="Table2.A2" office:value-type="string">
            <text:p text:style-name="P8"><text:span text:style-name="T4">React</text:span> (con TypeScript) y <text:span text:style-name="T4">Tailwind CSS</text:span>.</text:p>
          </table:table-cell>
        </table:table-row>
      </table:table>
      <text:h text:style-name="P9" text:outline-level="2"><text:span text:style-name="T10">👥 </text:span><text:span text:style-name="T11">Soft Skills (Habilidades Interpersonales)</text:span></text:h>
      <text:list xml:id="list1805448054" text:style-name="L1">
        <text:list-item>
          <text:p text:style-name="P10">Adaptación al cambio y trabajo en entornos de alta criticidad.</text:p>
        </text:list-item>
        <text:list-item text:style-override="L2">
          <text:p text:style-name="P11">Comunicación técnica clara con equipos funcionales y clientes.</text:p>
        </text:list-item>
        <text:list-item text:style-override="L3">
          <text:p text:style-name="P12">Proactividad y aprendizaje autónomo continuo.</text:p>
        </text:list-item>
        <text:list-item text:style-override="L4">
          <text:p text:style-name="P13">Enfoque en calidad: patrones de diseño, clean code y buenas prácticas.</text:p>
          <text:p text:style-name="P14"/>
        </text:list-item>
      </text:list>
      <text:h text:style-name="P15" text:outline-level="2"><text:soft-page-break/><text:span text:style-name="T10">💻 </text:span><text:span text:style-name="T11">Experiencia Profesional</text:span></text:h>
      <text:h text:style-name="P16" text:outline-level="3">Desarrollo Frontend Angular (2021 – Actualidad)</text:h>
      <text:h text:style-name="P17" text:outline-level="4">Worldgrid – Frontend Developer</text:h>
      <text:list xml:id="list4154734736" text:style-name="L5">
        <text:list-item>
          <text:p text:style-name="P18"><text:span text:style-name="T4">Periodo:</text:span> 1<text:span text:style-name="T12">2</text:span>/202<text:span text:style-name="T12">5</text:span> – <text:span text:style-name="T12">Actualidad</text:span></text:p>
        </text:list-item>
        <text:list-item>
          <text:p text:style-name="P18"><text:span text:style-name="T4">Logro Clave:</text:span> <text:span text:style-name="T12">Proyecto en el sector energético con </text:span><text:span text:style-name="T13">Angular 19</text:span><text:span text:style-name="T12">, </text:span><text:span text:style-name="T13">PrimeNg</text:span><text:span text:style-name="T14"> y </text:span><text:span text:style-name="T13">Tailwind CSS</text:span><text:span text:style-name="T14">, utilizando programación reactiva con </text:span><text:span text:style-name="T13">signals</text:span><text:span text:style-name="T14"> y </text:span><text:span text:style-name="T13">RxJS</text:span><text:span text:style-name="T14">. </text:span></text:p>
        </text:list-item>
      </text:list>
      <text:h text:style-name="P19" text:outline-level="4">Formación y Proyectos de Desarrollo Web</text:h>
      <text:list text:style-name="L6">
        <text:list-item>
          <text:p text:style-name="P20"><text:span text:style-name="T4">Periodo:</text:span> 04/2025 – <text:span text:style-name="T12">12/2025</text:span></text:p>
        </text:list-item>
        <text:list-item>
          <text:p text:style-name="P20"><text:span text:style-name="T4">Foco:</text:span> Periodo dedicado a la actualización profesional y al desarrollo de proyectos personales para mantener el nivel técnico en Angular y aprender nuevas tecnologías (<text:span text:style-name="T7">React + TypeScript</text:span> <text:span text:style-name="T7">+ Tailwind</text:span>).</text:p>
        </text:list-item>
      </text:list>
      <text:h text:style-name="Heading_20_4" text:outline-level="4" text:is-list-header="true">Alvea Soluciones Tecnológicas – Frontend Developer</text:h>
      <text:list text:continue-list="list4154734736" text:style-name="L5">
        <text:list-item>
          <text:p text:style-name="P21"><text:span text:style-name="T4">Periodo:</text:span> 10/2023 – 03/2025</text:p>
        </text:list-item>
        <text:list-item>
          <text:p text:style-name="P21"><text:span text:style-name="T4">Logro Clave:</text:span> Ejecución de migraciones a <text:span text:style-name="T4">Angular v14</text:span> para administraciones públicas, asegurando la continuidad operativa y la inclusión de nuevas funcionalidades.</text:p>
        </text:list-item>
      </text:list>
      <text:h text:style-name="Heading_20_4" text:outline-level="4" text:is-list-header="true">Tuyú Technologies – Frontend Developer Angular</text:h>
      <text:list text:style-name="L7">
        <text:list-item>
          <text:p text:style-name="P22"><text:span text:style-name="T4">Periodo:</text:span> 02/2023 – 10/2023</text:p>
        </text:list-item>
        <text:list-item>
          <text:p text:style-name="P23">Impacto Bancario (Banco Santander):</text:p>
          <text:list>
            <text:list-item>
              <text:p text:style-name="P22">Contribución en la fase inicial de la aplicación <text:span text:style-name="T4">Inmuebles</text:span>, construyendo una nueva arquitectura con <text:span text:style-name="T4">micro-frontends</text:span> en Angular v13.</text:p>
            </text:list-item>
            <text:list-item>
              <text:p text:style-name="P22">Participación técnica en la aplicación <text:span text:style-name="T4">Recobros de Empresas</text:span> utilizando Angular v13 y el gestor de estados <text:span text:style-name="T4">Akita</text:span>, incluyendo la implementación de pruebas automáticas.</text:p>
            </text:list-item>
          </text:list>
        </text:list-item>
      </text:list>
      <text:h text:style-name="Heading_20_4" text:outline-level="4" text:is-list-header="true">Hasten Group – Frontend Developer Angular</text:h>
      <text:list text:style-name="L8">
        <text:list-item>
          <text:p text:style-name="P24"><text:span text:style-name="T4">Periodo:</text:span> 08/2021 – 02/2023</text:p>
        </text:list-item>
        <text:list-item>
          <text:p text:style-name="P24"><text:span text:style-name="T4">Logro Clave (Segur Caixa):</text:span> Construcción del <text:span text:style-name="T4">nuevo canal asegurador</text:span> (múltiples aplicaciones) en Angular v9. Rol activo en soporte a análisis funcional, desarrollo y <text:span text:style-name="T4">presentación de soluciones técnicas al cliente</text:span>.</text:p>
        </text:list-item>
      </text:list>
      <text:h text:style-name="Heading_20_4" text:outline-level="4" text:is-list-header="true">CEO Escapadas por Madrid (Freelance/Paralelo)</text:h>
      <text:list text:style-name="L9">
        <text:list-item>
          <text:p text:style-name="P25"><text:span text:style-name="T4">Periodo:</text:span> 05/2018 – 01-2025</text:p>
        </text:list-item>
        <text:list-item>
          <text:p text:style-name="P25"><text:span text:style-name="T4">Logro Digital:</text:span> Creación y optimización SEO de sitio web. Arquitectura de contenido mediante <text:span text:style-name="T4">SEO tipo SILO</text:span> para maximizar la difusión cultural.</text:p>
        </text:list-item>
      </text:list>
      <text:h text:style-name="Heading_20_3" text:outline-level="3" text:is-list-header="true"><text:soft-page-break/>🏛️ <text:span text:style-name="T6">Experiencia en Programación de Sistemas Centrales (Legacy)</text:span></text:h>
      <text:h text:style-name="Heading_20_4" text:outline-level="4">Programador / Analista Orgánico en Entornos Bancarios (Capgemini, Sopra Steria)</text:h>
      <text:list text:style-name="L10">
        <text:list-item>
          <text:p text:style-name="P26"><text:span text:style-name="T4">Periodo:</text:span> 07/2003 – 05/2018 (14 años y 10 meses)</text:p>
        </text:list-item>
        <text:list-item>
          <text:p text:style-name="P26"><text:span text:style-name="T4">Tecnologías Clave:</text:span> COBOL, CICS, DB2 y JCL.</text:p>
        </text:list-item>
        <text:list-item>
          <text:p text:style-name="P26"><text:span text:style-name="T4">Resumen de Valor:</text:span> Más de 14 años de experiencia en el desarrollo de software en entornos Mainframe de alta criticidad. Experiencia integral en el <text:span text:style-name="T4">ciclo de vida del software</text:span> para sistemas esenciales. Conocimiento profundo para el <text:span text:style-name="T4">manejo de proyectos críticos</text:span> y la <text:span text:style-name="T4">migración de datos</text:span> entre entidades bancarias.</text:p>
        </text:list-item>
      </text:list>
      <text:h text:style-name="P27" text:outline-level="2">🎓 <text:span text:style-name="T6">Formación y Aprendizaje</text:span></text:h>
      <text:list text:style-name="L11">
        <text:list-item>
          <text:p text:style-name="P28"><text:span text:style-name="T4">Formación Profesional:</text:span> Técnico Superior en Desarrollo de Aplicaciones Informáticas (2000 / 2002).</text:p>
        </text:list-item>
        <text:list-item>
          <text:p text:style-name="P28"><text:span text:style-name="T4">Educación Secundaria:</text:span> BUP y COU con Selectividad (1996 / 2000).</text:p>
        </text:list-item>
        <text:list-item>
          <text:p text:style-name="P28"><text:span text:style-name="T4">Aprendizaje Continuo:</text:span> Formaciones presenciales y online en Udemy, Open Webinars y Coursera.</text:p>
        </text:list-item>
      </text:list>
      <text:h text:style-name="P27" text:outline-level="2">🗣️ <text:span text:style-name="T6">Idiomas</text:span></text:h>
      <text:list text:style-name="L12">
        <text:list-item>
          <text:p text:style-name="P29"><text:span text:style-name="T4">Español:</text:span> Nativo.</text:p>
        </text:list-item>
        <text:list-item>
          <text:p text:style-name="P29"><text:span text:style-name="T4">Inglés:</text:span> Comprensión y escritura nivel <text:span text:style-name="T4">Alto</text:span>. Conversación nivel Medio.</text:p>
        </text:list-item>
      </text:list>
      <text:p text:style-name="Text_20_body"/>
      <text:p text:style-name="Text_20_body"/>
      <text:p text:style-name="P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3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8T17:37:34.297072299</meta:creation-date>
    <dc:date>2026-02-05T18:58:38.802419000</dc:date>
    <meta:editing-duration>PT1H8M37S</meta:editing-duration>
    <meta:editing-cycles>18</meta:editing-cycles>
    <meta:generator>LibreOffice/25.8.4.2$MacOSX_AARCH64 LibreOffice_project/290daaa01b999472f0c7a3890eb6a550fd74c6df</meta:generator>
    <meta:print-date>2026-02-05T18:58:56.687652000</meta:print-date>
    <meta:printed-by>PDF files</meta:printed-by>
    <meta:document-statistic meta:table-count="2" meta:image-count="1" meta:object-count="0" meta:page-count="3" meta:paragraph-count="67" meta:word-count="601" meta:character-count="4212" meta:non-whitespace-character-count="3672"/>
  </office:meta>
</office:document-meta>
</file>