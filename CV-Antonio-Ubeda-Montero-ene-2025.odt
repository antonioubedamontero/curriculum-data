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A20000063FF437CB0F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1.499cm" fo:margin-left="0.019cm" fo:margin-top="0cm" fo:margin-bottom="0cm" table:align="left" style:writing-mode="lr-tb"/>
    </style:style>
    <style:style style:name="Table1.A" style:family="table-column">
      <style:table-column-properties style:column-width="2.609cm"/>
    </style:style>
    <style:style style:name="Table1.B" style:family="table-column">
      <style:table-column-properties style:column-width="8.89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middle" fo:background-color="#729fcf" fo:padding-left="0.203cm" fo:padding-right="0.203cm" fo:padding-top="0.083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203cm" fo:padding-right="0.203cm" fo:padding-top="0.083cm" fo:padding-bottom="0cm" fo:border="0.5pt solid #000000" style:writing-mode="lr-tb"/>
    </style:style>
    <style:style style:name="Table1.2" style:family="table-row">
      <style:table-row-properties style:min-row-height="0.898cm" fo:keep-together="auto"/>
    </style:style>
    <style:style style:name="Table1.B2" style:family="table-cell">
      <style:table-cell-properties fo:padding-left="0.203cm" fo:padding-right="0.203cm" fo:padding-top="0.083cm" fo:padding-bottom="0cm" fo:border="0.5pt solid #000000" style:writing-mode="lr-tb"/>
    </style:style>
    <style:style style:name="Table1.3" style:family="table-row">
      <style:table-row-properties style:min-row-height="0.841cm" fo:keep-together="auto"/>
    </style:style>
    <style:style style:name="Table1.A3" style:family="table-cell">
      <style:table-cell-properties style:vertical-align="middle" fo:background-color="#729fcf" fo:padding-left="0.203cm" fo:padding-right="0.203cm" fo:padding-top="0.083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padding-left="0.203cm" fo:padding-right="0.203cm" fo:padding-top="0.083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.074cm" fo:margin-top="0cm" fo:margin-bottom="0cm" style:contextual-spacing="false" fo:line-height="108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2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4" style:family="paragraph" style:parent-style-name="Standard">
      <style:paragraph-properties fo:margin-left="0cm" fo:margin-right="0.016cm" fo:margin-top="0cm" fo:margin-bottom="0cm" style:contextual-spacing="false" fo:line-height="108%" fo:text-align="center" style:justify-single-word="false" fo:text-indent="0cm" style:auto-text-indent="false"/>
      <style:text-properties fo:font-size="8pt" fo:font-weight="bold" style:font-size-asian="8pt" style:font-weight-asian="bold"/>
    </style:style>
    <style:style style:name="P5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left="0.009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.074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style:letter-kerning="false" style:font-size-asian="10pt" style:language-asian="es" style:country-asian="ES" style:font-size-complex="11pt" style:language-complex="ar" style:country-complex="SA"/>
    </style:style>
    <style:style style:name="P8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text-indent="0cm" style:auto-text-indent="false"/>
      <style:text-properties fo:color="#ffffff" loext:opacity="100%"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>
        <loext:char-complex-color loext:theme-type="light1" loext:color-type="theme"/>
      </style:text-properties>
    </style:style>
    <style:style style:name="P9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fo:font-style="italic" fo:font-weight="normal" style:letter-kerning="false" style:font-size-asian="11pt" style:language-asian="es" style:country-asian="ES" style:font-style-asian="italic" style:font-weight-asian="normal" style:font-size-complex="11pt" style:language-complex="ar" style:country-complex="SA" style:font-style-complex="italic" style:font-weight-complex="normal"/>
    </style:style>
    <style:style style:name="P10" style:family="paragraph" style:parent-style-name="Standard">
      <style:paragraph-properties fo:margin-left="0cm" fo:margin-right="0.004cm" fo:margin-top="0cm" fo:margin-bottom="0.34cm" style:contextual-spacing="false" fo:line-height="108%" fo:text-align="center" style:justify-single-word="false" fo:text-indent="0cm" style:auto-text-indent="false"/>
      <style:text-properties fo:font-size="10pt" style:font-size-asian="10pt"/>
    </style:style>
    <style:style style:name="P11" style:family="paragraph" style:parent-style-name="Heading_20_1">
      <style:paragraph-properties fo:margin-left="-0.009cm" fo:text-indent="-0.018cm" style:auto-text-indent="false"/>
    </style:style>
    <style:style style:name="P12" style:family="paragraph" style:parent-style-name="Standard">
      <style:paragraph-properties fo:margin-left="-0.051cm" fo:margin-right="0cm" fo:margin-top="0cm" fo:margin-bottom="0.295cm" style:contextual-spacing="false" fo:line-height="108%" fo:text-align="start" style:justify-single-word="false" fo:text-indent="0cm" style:auto-text-indent="false"/>
    </style:style>
    <style:style style:name="P13" style:family="paragraph">
      <loext:graphic-properties draw:fill="solid" draw:fill-color="#4a9bdc"/>
      <style:paragraph-properties fo:text-align="start"/>
      <style:text-properties fo:font-size="11pt"/>
    </style:style>
    <style:style style:name="P1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officeooo:paragraph-rsid="0123f0af"/>
    </style:style>
    <style:style style:name="P15" style:family="paragraph" style:parent-style-name="Standard">
      <style:paragraph-properties fo:margin-left="0cm" fo:margin-right="0cm" fo:margin-top="0cm" fo:margin-bottom="0.034cm" style:contextual-spacing="false" fo:line-height="108%" fo:text-align="start" style:justify-single-word="false" fo:text-indent="0cm" style:auto-text-indent="false"/>
    </style:style>
    <style:style style:name="P16" style:family="paragraph" style:parent-style-name="Standard">
      <style:paragraph-properties fo:margin-left="-0.051cm" fo:margin-right="0cm" fo:margin-top="0cm" fo:margin-bottom="0.293cm" style:contextual-spacing="false" fo:line-height="108%" fo:text-align="start" style:justify-single-word="false" fo:text-indent="0cm" style:auto-text-indent="false"/>
    </style:style>
    <style:style style:name="P17" style:family="paragraph" style:parent-style-name="Standard" style:list-style-name="WWNum7">
      <style:paragraph-properties fo:margin-left="1.244cm" fo:margin-right="0.049cm" fo:text-indent="-0.635cm" style:auto-text-indent="false"/>
      <style:text-properties officeooo:rsid="026fee50" officeooo:paragraph-rsid="026fee50"/>
    </style:style>
    <style:style style:name="P18" style:family="paragraph" style:parent-style-name="Standard" style:list-style-name="WWNum7">
      <style:paragraph-properties fo:margin-left="1.244cm" fo:margin-right="0.049cm" fo:text-indent="-0.635cm" style:auto-text-indent="false"/>
      <style:text-properties officeooo:paragraph-rsid="026fee50"/>
    </style:style>
    <style:style style:name="P19" style:family="paragraph" style:parent-style-name="Standard" style:list-style-name="WWNum7">
      <style:paragraph-properties fo:margin-left="1.244cm" fo:margin-right="0.049cm" fo:text-indent="-0.635cm" style:auto-text-indent="false"/>
    </style:style>
    <style:style style:name="P20" style:family="paragraph" style:parent-style-name="Standard" style:list-style-name="WWNum7">
      <style:paragraph-properties fo:margin-left="1.244cm" fo:margin-right="0.049cm" fo:text-indent="-0.635cm" style:auto-text-indent="false"/>
      <style:text-properties officeooo:rsid="025032ff" officeooo:paragraph-rsid="025032ff"/>
    </style:style>
    <style:style style:name="P21" style:family="paragraph" style:parent-style-name="Standard">
      <style:paragraph-properties fo:margin-left="1.244cm" fo:margin-right="0.049cm" fo:margin-top="0cm" fo:margin-bottom="0.051cm" style:contextual-spacing="false" fo:line-height="111%" fo:text-indent="0cm" style:auto-text-indent="false"/>
    </style:style>
    <style:style style:name="P22" style:family="paragraph" style:parent-style-name="Standard" style:list-style-name="WWNum8">
      <style:paragraph-properties fo:margin-left="1.244cm" fo:margin-right="0.049cm" fo:text-indent="-0.635cm" style:auto-text-indent="false"/>
    </style:style>
    <style:style style:name="P23" style:family="paragraph" style:parent-style-name="Standard" style:list-style-name="WWNum8">
      <style:paragraph-properties fo:margin-left="1.244cm" fo:margin-right="0.049cm" fo:margin-top="0cm" fo:margin-bottom="0cm" style:contextual-spacing="false" fo:text-indent="-0.635cm" style:auto-text-indent="false"/>
    </style:style>
    <style:style style:name="P24" style:family="paragraph" style:parent-style-name="Standard">
      <style:paragraph-properties fo:margin-left="1.244cm" fo:margin-right="0cm" fo:margin-top="0cm" fo:margin-bottom="0.519cm" style:contextual-spacing="false" fo:line-height="108%" fo:text-align="start" style:justify-single-word="false" fo:text-indent="0cm" style:auto-text-indent="false"/>
      <style:text-properties fo:font-size="10pt" style:font-size-asian="10pt"/>
    </style:style>
    <style:style style:name="P25" style:family="paragraph" style:parent-style-name="Heading_20_1">
      <style:paragraph-properties fo:margin-left="-0.009cm" fo:text-indent="0cm" style:auto-text-indent="false"/>
    </style:style>
    <style:style style:name="P26" style:family="paragraph" style:parent-style-name="Heading_20_1">
      <style:paragraph-properties fo:margin-left="-0.009cm"/>
      <style:text-properties officeooo:paragraph-rsid="02175fc7"/>
    </style:style>
    <style:style style:name="P27" style:family="paragraph" style:parent-style-name="Standard">
      <style:paragraph-properties fo:margin-left="-0.009cm"/>
      <style:text-properties officeooo:paragraph-rsid="02175fc7"/>
    </style:style>
    <style:style style:name="P28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officeooo:paragraph-rsid="0278000c"/>
    </style:style>
    <style:style style:name="P29" style:family="paragraph" style:parent-style-name="List_20_Paragraph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fo:font-weight="bold" officeooo:paragraph-rsid="0278000c" style:font-weight-asian="bold" style:font-weight-complex="bold"/>
    </style:style>
    <style:style style:name="P30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officeooo:paragraph-rsid="026fee50"/>
    </style:style>
    <style:style style:name="P31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26fee50" style:font-weight-asian="bold" style:font-weight-complex="bold"/>
    </style:style>
    <style:style style:name="P32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26fee50" style:font-weight-asian="normal" style:font-weight-complex="normal"/>
    </style:style>
    <style:style style:name="P33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34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</style:style>
    <style:style style:name="P35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218b6" style:font-weight-asian="bold" style:font-weight-complex="bold"/>
    </style:style>
    <style:style style:name="P36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3f0af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123f0af" style:font-weight-asian="normal" style:font-weight-complex="normal"/>
    </style:style>
    <style:style style:name="P38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9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40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2177a38"/>
    </style:style>
    <style:style style:name="P41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42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1e767c7"/>
    </style:style>
    <style:style style:name="P43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44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45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7af1c8"/>
    </style:style>
    <style:style style:name="P46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47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49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rsid="00d7e34a" style:font-weight-complex="bold"/>
    </style:style>
    <style:style style:name="P50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51" style:family="paragraph" style:parent-style-name="Standard" style:list-style-name="WWNum3">
      <style:paragraph-properties fo:margin-left="1.244cm" fo:margin-right="0cm" fo:margin-top="0cm" fo:margin-bottom="0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52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53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0ec86f2"/>
    </style:style>
    <style:style style:name="P54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2190660"/>
    </style:style>
    <style:style style:name="P55" style:family="paragraph" style:parent-style-name="List_20_Paragraph" style:list-style-name="WWNum12">
      <style:paragraph-properties fo:margin-left="1.27cm" fo:margin-right="0.049cm" fo:text-indent="-0.635cm" style:auto-text-indent="false"/>
    </style:style>
    <style:style style:name="P56" style:family="paragraph" style:parent-style-name="List_20_Paragraph">
      <style:paragraph-properties fo:margin-left="1.27cm" fo:margin-right="0.049cm" fo:text-indent="0cm" style:auto-text-indent="false"/>
      <style:text-properties fo:font-weight="bold" style:font-weight-asian="bold" style:font-weight-complex="bold"/>
    </style:style>
    <style:style style:name="P57" style:family="paragraph" style:parent-style-name="List_20_Paragraph">
      <style:paragraph-properties fo:margin-left="1.27cm" fo:margin-right="0.049cm" fo:text-indent="0cm" style:auto-text-indent="false"/>
    </style:style>
    <style:style style:name="P58" style:family="paragraph" style:parent-style-name="Standard">
      <style:paragraph-properties fo:margin-left="0cm" fo:margin-right="0cm" fo:margin-top="0cm" fo:margin-bottom="0.095cm" style:contextual-spacing="false" fo:line-height="108%" fo:text-align="start" style:justify-single-word="false" fo:text-indent="0cm" style:auto-text-indent="false"/>
    </style:style>
    <style:style style:name="P59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</style:style>
    <style:style style:name="P60" style:family="paragraph" style:parent-style-name="Standard">
      <style:paragraph-properties fo:margin-left="1.266cm" fo:margin-right="0.049cm" fo:margin-top="0cm" fo:margin-bottom="0.247cm" style:contextual-spacing="false" fo:text-indent="-0.018cm" style:auto-text-indent="false"/>
    </style:style>
    <style:style style:name="P61" style:family="paragraph" style:parent-style-name="Standard">
      <style:paragraph-properties fo:margin-left="2.54cm" fo:margin-right="0cm" fo:margin-top="0cm" fo:margin-bottom="0.093cm" style:contextual-spacing="false" fo:line-height="108%" fo:text-align="start" style:justify-single-word="false" fo:text-indent="0cm" style:auto-text-indent="false"/>
    </style:style>
    <style:style style:name="P62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63" style:family="paragraph" style:parent-style-name="Standard">
      <style:paragraph-properties fo:margin-left="1.266cm" fo:margin-right="0.049cm" fo:margin-top="0cm" fo:margin-bottom="0.445cm" style:contextual-spacing="false" fo:text-indent="-0.018cm" style:auto-text-indent="false"/>
    </style:style>
    <style:style style:name="P64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</style:style>
    <style:style style:name="P65" style:family="paragraph" style:parent-style-name="Standard">
      <style:paragraph-properties fo:margin-left="1.288cm" fo:margin-right="0.049cm" fo:text-indent="-0.018cm" style:auto-text-indent="false"/>
    </style:style>
    <style:style style:name="P66" style:family="paragraph" style:parent-style-name="Standard">
      <style:paragraph-properties fo:margin-left="1.27cm" fo:margin-right="0cm" fo:margin-top="0cm" fo:margin-bottom="0.116cm" style:contextual-spacing="false" fo:line-height="108%" fo:text-align="start" style:justify-single-word="false" fo:text-indent="0cm" style:auto-text-indent="false"/>
    </style:style>
    <style:style style:name="P67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68" style:family="paragraph" style:parent-style-name="List_20_Paragraph" style:list-style-name="WWNum9">
      <style:paragraph-properties fo:margin-left="1.905cm" fo:margin-right="0cm" fo:margin-top="0cm" fo:margin-bottom="0.339cm" style:contextual-spacing="true" fo:line-height="108%" fo:text-align="start" style:justify-single-word="false" fo:text-indent="-0.635cm" style:auto-text-indent="false"/>
    </style:style>
    <style:style style:name="P69" style:family="paragraph" style:parent-style-name="Standard">
      <style:paragraph-properties fo:margin-left="1.266cm" fo:margin-right="0.049cm" fo:margin-top="0cm" fo:margin-bottom="0.422cm" style:contextual-spacing="false" fo:text-indent="-0.018cm" style:auto-text-indent="false"/>
    </style:style>
    <style:style style:name="P70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  <style:text-properties officeooo:paragraph-rsid="02175fc7"/>
    </style:style>
    <style:style style:name="P71" style:family="paragraph" style:parent-style-name="List_20_Paragraph" style:list-style-name="WWNum10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72" style:family="paragraph" style:parent-style-name="Standard">
      <style:paragraph-properties fo:margin-left="1.27cm" fo:margin-right="0cm" fo:margin-top="0cm" fo:margin-bottom="0.034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73" style:family="paragraph" style:parent-style-name="Standard">
      <style:paragraph-properties fo:margin-left="1.27cm" fo:margin-right="0cm" fo:margin-top="0cm" fo:margin-bottom="0.312cm" style:contextual-spacing="false" fo:line-height="108%" fo:text-align="start" style:justify-single-word="false" fo:text-indent="0cm" style:auto-text-indent="false"/>
    </style:style>
    <style:style style:name="P74" style:family="paragraph" style:parent-style-name="Standard">
      <style:paragraph-properties fo:margin-left="-0.051cm" fo:margin-right="0cm" fo:margin-top="0cm" fo:margin-bottom="0.291cm" style:contextual-spacing="false" fo:line-height="108%" fo:text-align="start" style:justify-single-word="false" fo:text-indent="0cm" style:auto-text-indent="false"/>
    </style:style>
    <style:style style:name="P75" style:family="paragraph" style:parent-style-name="Standard" style:list-style-name="WWNum11">
      <style:paragraph-properties fo:margin-left="1.244cm" fo:margin-right="0cm" fo:margin-top="0cm" fo:margin-bottom="0.081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76" style:family="paragraph" style:parent-style-name="Standard" style:list-style-name="WWNum11">
      <style:paragraph-properties fo:margin-left="1.244cm" fo:margin-right="0cm" fo:margin-top="0cm" fo:margin-bottom="0.556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T1" style:family="text">
      <style:text-properties fo:color="#0070c0" loext:opacity="100%" fo:font-size="14pt" fo:font-weight="bold" style:font-size-asian="14pt" style:font-weight-asian="bold"/>
    </style:style>
    <style:style style:name="T2" style:family="text">
      <style:text-properties fo:color="#4472c4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3" style:family="text">
      <style:text-properties fo:color="#0070c0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loext:opacity="100%" fo:font-size="10pt" fo:font-weight="bold" style:font-size-asian="10pt" style:font-weight-asian="bold" style:font-weight-complex="bold">
        <loext:char-complex-color loext:theme-type="light1" loext:color-type="theme"/>
      </style:text-properties>
    </style:style>
    <style:style style:name="T6" style:family="text">
      <style:text-properties style:use-window-font-color="true" loext:opacity="0%" fo:font-size="10pt" fo:font-weight="bold" style:font-size-asian="10pt" style:font-weight-asian="bold" style:font-weight-complex="bold"/>
    </style:style>
    <style:style style:name="T7" style:family="text">
      <style:text-properties fo:color="#0000ff" loext:opacity="100%" fo:font-size="10pt" style:text-underline-style="solid" style:text-underline-width="auto" style:text-underline-color="#0000ff" style:font-size-asian="10pt"/>
    </style:style>
    <style:style style:name="T8" style:family="text">
      <style:text-properties fo:font-size="10pt" style:font-size-asian="10pt"/>
    </style:style>
    <style:style style:name="T9" style:family="text">
      <style:text-properties fo:color="#4d10f8" loext:opacity="100%" fo:font-weight="bold" style:font-weight-asian="bold" style:font-weight-complex="bold"/>
    </style:style>
    <style:style style:name="T10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T11" style:family="text">
      <style:text-properties fo:font-weight="normal" officeooo:rsid="0123f0af" style:font-weight-asian="normal" style:font-weight-complex="normal"/>
    </style:style>
    <style:style style:name="T12" style:family="text">
      <style:text-properties fo:font-weight="bold" officeooo:rsid="0255ce81" style:font-weight-asian="bold" style:font-weight-complex="bold"/>
    </style:style>
    <style:style style:name="T13" style:family="text">
      <style:text-properties fo:font-weight="bold" officeooo:rsid="0123f0af" style:font-weight-asian="bold" style:font-weight-complex="bold"/>
    </style:style>
    <style:style style:name="T14" style:family="text">
      <style:text-properties fo:font-weight="bold" officeooo:rsid="0252ed16" style:font-weight-asian="bold" style:font-weight-complex="bold"/>
    </style:style>
    <style:style style:name="T15" style:family="text">
      <style:text-properties fo:font-weight="normal" officeooo:rsid="0252ed16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26fee50" style:font-weight-asian="normal" style:font-weight-complex="normal"/>
    </style:style>
    <style:style style:name="T18" style:family="text">
      <style:text-properties officeooo:rsid="003ea80e"/>
    </style:style>
    <style:style style:name="T19" style:family="text">
      <style:text-properties fo:font-weight="bold" officeooo:rsid="002a4b4e" style:font-weight-asian="bold" style:font-weight-complex="bold"/>
    </style:style>
    <style:style style:name="T20" style:family="text">
      <style:text-properties fo:color="#4472c4" loext:opacity="100%" fo:font-size="12pt" fo:font-weight="bold" officeooo:rsid="02175fc7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1" style:family="text">
      <style:text-properties fo:color="#4472c4" loext:opacity="100%" fo:font-size="12pt" fo:font-weight="bold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2" style:family="text">
      <style:text-properties fo:font-weight="bold" officeooo:rsid="0278000c" style:font-weight-asian="bold" style:font-weight-complex="bold"/>
    </style:style>
    <style:style style:name="T23" style:family="text">
      <style:text-properties fo:font-weight="bold" officeooo:rsid="026fee50" style:font-weight-asian="bold" style:font-weight-complex="bold"/>
    </style:style>
    <style:style style:name="T24" style:family="text">
      <style:text-properties fo:font-weight="normal" officeooo:rsid="0278000c" style:font-weight-asian="normal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weight="bold" officeooo:rsid="025c549a" style:font-weight-asian="bold" style:font-weight-complex="bold"/>
    </style:style>
    <style:style style:name="T27" style:family="text">
      <style:text-properties fo:font-weight="bold" officeooo:rsid="025da28f" style:font-weight-asian="bold" style:font-weight-complex="bold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officeooo:rsid="012218b6" style:font-weight-asian="bold"/>
    </style:style>
    <style:style style:name="T30" style:family="text">
      <style:text-properties style:font-weight-complex="bold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22bafb8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2177a38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12218b6" style:font-weight-asian="bold" style:font-weight-complex="bold"/>
    </style:style>
    <style:style style:name="T35" style:family="text">
      <style:text-properties officeooo:rsid="02177a38" style:font-weight-complex="bold"/>
    </style:style>
    <style:style style:name="T36" style:family="text">
      <style:text-properties fo:font-variant="normal" fo:text-transform="none" fo:color="#1f2328" loext:opacity="100%" fo:font-family="apple-system, system-ui, 'Segoe UI', 'Noto Sans', Helvetica, Arial, sans-serif, 'Apple Color Emoji', 'Segoe UI Emoji'" fo:font-size="11pt" fo:letter-spacing="normal" fo:font-style="normal" fo:font-weight="normal" style:font-size-asian="11pt" style:font-size-complex="11pt" style:font-weight-complex="bold"/>
    </style:style>
    <style:style style:name="T37" style:family="text">
      <style:text-properties fo:font-size="11pt" style:font-size-asian="11pt" style:font-size-complex="11pt" style:font-weight-complex="bold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style:text-underline-style="solid" style:text-underline-width="auto" style:text-underline-color="font-color" fo:font-weight="bold" officeooo:rsid="012218b6" style:font-weight-asian="bold"/>
    </style:style>
    <style:style style:name="T40" style:family="text">
      <style:text-properties officeooo:rsid="00830c0f" style:font-weight-complex="bold"/>
    </style:style>
    <style:style style:name="T41" style:family="text">
      <style:text-properties officeooo:rsid="00791705" style:font-weight-complex="bold"/>
    </style:style>
    <style:style style:name="T42" style:family="text">
      <style:text-properties officeooo:rsid="007af1c8" style:font-weight-complex="bold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00d7e34a" style:font-weight-complex="bold"/>
    </style:style>
    <style:style style:name="T45" style:family="text">
      <style:text-properties officeooo:rsid="00d8dca8" style:font-weight-complex="bold"/>
    </style:style>
    <style:style style:name="T46" style:family="text">
      <style:text-properties officeooo:rsid="00ec86f2"/>
    </style:style>
    <style:style style:name="T47" style:family="text">
      <style:text-properties officeooo:rsid="00f9cff7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style:text-underline-style="none" fo:font-weight="bold" officeooo:rsid="00ff8aa1" style:font-weight-asian="bold" style:font-weight-complex="bold"/>
    </style:style>
    <style:style style:name="T50" style:family="text">
      <style:text-properties fo:font-weight="bold" officeooo:rsid="00ff8aa1" style:font-weight-asian="bold" style:font-weight-complex="bold"/>
    </style:style>
    <style:style style:name="T51" style:family="text">
      <style:text-properties fo:font-weight="bold" officeooo:rsid="018fe190" style:font-weight-asian="bold" style:font-weight-complex="bold"/>
    </style:style>
    <style:style style:name="T52" style:family="text">
      <style:text-properties fo:font-weight="bold" officeooo:rsid="018e56a1" style:font-weight-asian="bold" style:font-weight-complex="bold"/>
    </style:style>
    <style:style style:name="T53" style:family="text">
      <style:text-properties style:text-underline-style="none" fo:font-weight="bold" style:font-weight-asian="bold"/>
    </style:style>
    <style:style style:name="T54" style:family="text">
      <style:text-properties style:text-underline-style="none" fo:font-weight="bold" officeooo:rsid="0104f88c" style:font-weight-asian="bold"/>
    </style:style>
    <style:style style:name="T55" style:family="text">
      <style:text-properties officeooo:rsid="010fdb2d"/>
    </style:style>
    <style:style style:name="T56" style:family="text">
      <style:text-properties officeooo:rsid="0115e3df"/>
    </style:style>
    <style:style style:name="T57" style:family="text">
      <style:text-properties style:text-underline-style="solid" style:text-underline-width="auto" style:text-underline-color="font-color" fo:font-weight="bold" officeooo:rsid="01161f10" style:font-weight-asian="bold"/>
    </style:style>
    <style:style style:name="T58" style:family="text">
      <style:text-properties fo:color="#4472c4" loext:opacity="100%" fo:font-size="12pt" fo:font-weight="bold" officeooo:rsid="0256eddf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officeooo:rsid="0256eddf"/>
    </style:style>
    <style:style style:name="T61" style:family="text">
      <style:text-properties fo:color="#4472c4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4a9bdc" draw:textarea-vertical-align="top" draw:auto-grow-height="false" fo:min-height="0.034cm" fo:min-width="15.104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Úbeda Montero </text:p>
      <text:p text:style-name="P2" loext:marker-style-name="T1"><text:span text:style-name="T2">Desarrollador Frontend – Angular &amp; Node</text:span><text:span text:style-name="T3"/></text:p>
      <text:p text:style-name="P3"><text:s/><draw:frame draw:style-name="fr1" draw:name="Image1" text:anchor-type="char" svg:x="13.192cm" svg:y="0.4cm" svg:width="1.834cm" svg:height="3.007cm" draw:z-index="5"><draw:image xlink:href="Pictures/10000000000004A20000063FF437CB0F.jpg" xlink:type="simple" xlink:show="embed" xlink:actuate="onLoad" draw:mime-type="image/jpeg"/></draw:frame></text:p>
      <text:p text:style-name="P4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4"><text:span text:style-name="T5">Teléfono</text:span><text:span text:style-name="T6"> </text:span></text:p>
          </table:table-cell>
          <table:table-cell table:style-name="Table1.B1" office:value-type="string">
            <text:p text:style-name="P6">617 84 40 85 </text:p>
          </table:table-cell>
        </table:table-row>
        <table:table-row table:style-name="Table1.2">
          <table:table-cell table:style-name="Table1.A1" office:value-type="string">
            <text:p text:style-name="P5" loext:marker-style-name="T4"><text:span text:style-name="T5">Email </text:span><text:span text:style-name="T5"/></text:p>
          </table:table-cell>
          <table:table-cell table:style-name="Table1.B2" office:value-type="string">
            <text:p text:style-name="P5"><text:span text:style-name="T7">anubedam@gmail.com</text:span><text:span text:style-name="T8"> </text:span></text:p>
            <text:p text:style-name="P7"><text:s/></text:p>
          </table:table-cell>
        </table:table-row>
        <table:table-row table:style-name="Table1.3">
          <table:table-cell table:style-name="Table1.A3" office:value-type="string">
            <text:p text:style-name="P8">Web</text:p>
          </table:table-cell>
          <table:table-cell table:style-name="Table1.B3" office:value-type="string">
            <text:p text:style-name="P9"><text:a xlink:type="simple" xlink:href="https://www.antonioubedamontero.com/" text:style-name="Internet_20_link" text:visited-style-name="Visited_20_Internet_20_Link">https://www.antonioubedamontero.com/</text:a></text:p>
          </table:table-cell>
        </table:table-row>
      </table:table>
      <text:p text:style-name="P10"><text:s/></text:p>
      <text:h text:style-name="P11" text:outline-level="1" loext:marker-style-name="T9"><text:span text:style-name="T10">Resumen</text:span><text:span text:style-name="T9"> </text:span></text:h>
      <text:p text:style-name="P12"><draw:g text:anchor-type="as-char" draw:z-index="0" draw:name="Group 3122" draw:style-name="gr1"><draw:custom-shape draw:name="Shape 3598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14"><text:span text:style-name="T11">Soy Antonio Úbeda Montero, </text:span><text:span text:style-name="T12">d</text:span><text:span text:style-name="Strong_20_Emphasis"><text:span text:style-name="T13">esarrollador web </text:span></text:span><text:span text:style-name="Strong_20_Emphasis"><text:span text:style-name="T14">F</text:span></text:span><text:span text:style-name="Strong_20_Emphasis"><text:span text:style-name="T13">rontend</text:span></text:span><text:span text:style-name="T11"> autodidacta con más de 20 años de experiencia, especializado en </text:span><text:span text:style-name="Strong_20_Emphasis"><text:span text:style-name="T13">Angular</text:span></text:span><text:span text:style-name="T11">, </text:span><text:span text:style-name="Strong_20_Emphasis"><text:span text:style-name="T13">TypeScript</text:span></text:span><text:span text:style-name="T11">, </text:span><text:span text:style-name="Strong_20_Emphasis"><text:span text:style-name="T13">HTML5</text:span></text:span><text:span text:style-name="T11">, </text:span><text:span text:style-name="Strong_20_Emphasis"><text:span text:style-name="T13">CSS3</text:span></text:span><text:span text:style-name="T11"> y </text:span><text:span text:style-name="Strong_20_Emphasis"><text:span text:style-name="T11">Node.js</text:span></text:span><text:span text:style-name="T11">.</text:span></text:p>
      <text:p text:style-name="P14"><text:span text:style-name="T11"/></text:p>
      <text:p text:style-name="P14"><text:span text:style-name="T11">A lo largo de mi carrera he trabajado en proyectos para grandes empresas como Banco Santander y SegurCaixa, aplicando </text:span><text:span text:style-name="Strong_20_Emphasis"><text:span text:style-name="T11">metodologías ágiles</text:span></text:span><text:span text:style-name="T11"> como </text:span><text:span text:style-name="Strong_20_Emphasis"><text:span text:style-name="T13">Scrum</text:span></text:span><text:span text:style-name="T11"> y </text:span><text:span text:style-name="Strong_20_Emphasis"><text:span text:style-name="T13">Lean</text:span></text:span><text:span text:style-name="T11">, </text:span><text:span text:style-name="T15">así</text:span><text:span text:style-name="T11"> </text:span><text:span text:style-name="T15">como </text:span><text:span text:style-name="T11">buenas prácticas de desarrollo como </text:span><text:span text:style-name="Strong_20_Emphasis"><text:span text:style-name="T13">Clean Code</text:span></text:span><text:span text:style-name="T11"> y </text:span><text:span text:style-name="T14">P</text:span><text:span text:style-name="Strong_20_Emphasis"><text:span text:style-name="T13">atrones de </text:span></text:span><text:span text:style-name="Strong_20_Emphasis"><text:span text:style-name="T14">D</text:span></text:span><text:span text:style-name="Strong_20_Emphasis"><text:span text:style-name="T13">iseño</text:span></text:span><text:span text:style-name="T11">.</text:span></text:p>
      <text:p text:style-name="P14"><text:span text:style-name="T11"/></text:p>
      <text:p text:style-name="P14"><text:span text:style-name="T11">Me enfoco en construir interfaces accesibles, optimizadas para buscadores y con un alto rendimiento, utilizando </text:span><text:span text:style-name="Strong_20_Emphasis"><text:span text:style-name="T13">HTML semántico</text:span></text:span><text:span text:style-name="T11"> y </text:span><text:span text:style-name="Strong_20_Emphasis"><text:span text:style-name="T13">diseño responsive</text:span></text:span><text:span text:style-name="T11">.</text:span></text:p>
      <text:p text:style-name="P15"/>
      <text:h text:style-name="P11" text:outline-level="1" loext:marker-style-name="T10"><text:span text:style-name="T10">Habilidades </text:span><text:span text:style-name="T10"/></text:h>
      <text:p text:style-name="P16"><draw:g text:anchor-type="as-char" draw:z-index="1" draw:name="Group 3123" draw:style-name="gr1"><draw:custom-shape draw:name="Shape 3600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7">
        <text:list-item>
          <text:p text:style-name="P17">En aprendizaje de <text:span text:style-name="T4">React con Typescript</text:span><text:span text:style-name="T16"> y</text:span><text:span text:style-name="T4"> Tailwind</text:span>.</text:p>
        </text:list-item>
        <text:list-item>
          <text:p text:style-name="P18"><text:span text:style-name="T4">HTML5, CSS3 y SASS (BEM), Javascript, JQuery y Typescript</text:span><text:span text:style-name="T16">.</text:span></text:p>
        </text:list-item>
        <text:list-item>
          <text:p text:style-name="P19">Control de versiones con <text:span text:style-name="T4">GIT</text:span> con <text:span text:style-name="T4">feature/branch </text:span>y <text:span text:style-name="T4">Versionado Semántico</text:span>.</text:p>
        </text:list-item>
        <text:list-item>
          <text:p text:style-name="P19"><text:span text:style-name="T4">Angular </text:span><text:span text:style-name="T17">(actualizado a versión 20) </text:span>y <text:span text:style-name="T4">NodeJs </text:span>con el editor <text:span text:style-name="T4">Visual Studio Code</text:span>.</text:p>
        </text:list-item>
        <text:list-item>
          <text:p text:style-name="P20">Programación reactiva con <text:span text:style-name="T4">señales</text:span><text:span text:style-name="T16">,</text:span><text:span text:style-name="T4"> propiedades computadas </text:span><text:span text:style-name="T16">y</text:span><text:span text:style-name="T4"> efectos.</text:span></text:p>
        </text:list-item>
        <text:list-item>
          <text:p text:style-name="P19">Pruebas con <text:span text:style-name="T4">Jasmine</text:span> y <text:span text:style-name="T4">Karma</text:span>. Mocks con <text:span text:style-name="T4">Json-Server</text:span> y <text:span text:style-name="T4">Nodered</text:span>.</text:p>
        </text:list-item>
        <text:list-item>
          <text:p text:style-name="P19">Programación Reactiva con <text:span text:style-name="T4">RxJS</text:span>.</text:p>
        </text:list-item>
        <text:list-item>
          <text:p text:style-name="P19"><text:span text:style-name="T4">Angular Material</text:span>, <text:span text:style-name="T4">Angular Flex Layout</text:span>, <text:span text:style-name="T4">Bootstrap</text:span>, <text:span text:style-name="T4">Flexbox </text:span>y <text:span text:style-name="T4">CSS Grid</text:span>.</text:p>
        </text:list-item>
        <text:list-item>
          <text:p text:style-name="P19">Uso de <text:span text:style-name="T4">Patrones de Diseño </text:span>y <text:span text:style-name="T4">Clean Code</text:span>.</text:p>
        </text:list-item>
        <text:list-item>
          <text:p text:style-name="P19">Contenerización y despliegue con <text:span text:style-name="T4">Docker </text:span>y <text:span text:style-name="T4">Jenkis</text:span>.</text:p>
        </text:list-item>
        <text:list-item>
          <text:p text:style-name="P19">Bases de Datos: <text:span text:style-name="T4">Oracle</text:span>, <text:span text:style-name="T4">My-SQL</text:span> / <text:span text:style-name="T4">Maria-DB</text:span> y <text:span text:style-name="T4">MongoDB</text:span> <text:span text:style-name="T4">(Windows y Linux)</text:span>.</text:p>
        </text:list-item>
        <text:list-item>
          <text:p text:style-name="P19">Conocimientos de <text:span text:style-name="T4">SEO</text:span> y <text:span text:style-name="T4">HTML Semántico</text:span>.</text:p>
        </text:list-item>
        <text:list-item>
          <text:p text:style-name="P19">Metodologías <text:span text:style-name="T4">SCRUM </text:span>y <text:span text:style-name="T4">LEAN.</text:span></text:p>
        </text:list-item>
      </text:list>
      <text:p text:style-name="P21"/>
      <text:h text:style-name="P11" text:outline-level="1"><text:span text:style-name="T10">Formación</text:span> </text:h>
      <text:p text:style-name="P16"><draw:g text:anchor-type="as-char" draw:z-index="2" draw:name="Group 3124" draw:style-name="gr1"><draw:custom-shape draw:name="Shape 3602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8">
        <text:list-item>
          <text:p text:style-name="P22">1996 / 2000: <text:span text:style-name="T4">BUP</text:span> y<text:span text:style-name="T4"> COU</text:span> con Selectividad. </text:p>
        </text:list-item>
        <text:list-item>
          <text:p text:style-name="P22">2000 / 2002: <text:span text:style-name="T4">Técnico superior en Desarrollo de Aplicaciones Informáticas</text:span> (<text:span text:style-name="T4">C</text:span>, <text:span text:style-name="T4">Visual Basic</text:span>, <text:span text:style-name="T4">BBDD Oracle</text:span>, <text:span text:style-name="T4">Unix</text:span> y <text:span text:style-name="T4">metodologías de análisis</text:span>).<text:span text:style-name="T8"> </text:span></text:p>
        </text:list-item>
        <text:list-item>
          <text:p text:style-name="P23"><text:span text:style-name="T4">Formaciones presenciales y on-line</text:span> <text:span text:style-name="T18">en</text:span> <text:span text:style-name="T4">Udemy</text:span>, <text:span text:style-name="T4">Open Webinars </text:span>y <text:span text:style-name="T4">Courser</text:span><text:span text:style-name="T19">a</text:span>. <text:span text:style-name="T8"><text:s/></text:span></text:p>
          <text:p text:style-name="P23"><text:span text:style-name="T8"/></text:p>
        </text:list-item>
      </text:list>
      <text:p text:style-name="P24" loext:marker-style-name="T8"/>
      <text:p text:style-name="P24" loext:marker-style-name="T8"><text:soft-page-break/></text:p>
      <text:h text:style-name="P25" text:outline-level="1" loext:marker-style-name="T10"><text:span text:style-name="T10">Experiencia Profesional </text:span></text:h>
      <text:p text:style-name="P12"><draw:g text:anchor-type="as-char" draw:z-index="3" draw:name="Group 3125" draw:style-name="gr1"><draw:custom-shape draw:name="Shape 3604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h text:style-name="P26" text:outline-level="1" loext:marker-style-name="T10"><text:tab/><text:tab/> <text:s text:c="4"/><text:span text:style-name="T20">Experiencia laboral en Desarrollo Web</text:span><text:span text:style-name="T21">:</text:span> <text:s/></text:h>
      <text:p text:style-name="P27" loext:marker-style-name="T10"/>
      <text:list text:style-name="WWNum6">
        <text:list-item>
          <text:p text:style-name="P28"><text:span text:style-name="T22">Worldgrid</text:span><text:span text:style-name="T4"> [</text:span><text:span text:style-name="T22">12</text:span><text:span text:style-name="T4">/202</text:span><text:span text:style-name="T23">5</text:span><text:span text:style-name="T4"> – </text:span><text:span text:style-name="T23">Actualidad</text:span><text:span text:style-name="T4">]</text:span></text:p>
        </text:list-item>
      </text:list>
      <text:p text:style-name="P29"/>
      <text:p text:style-name="P29"><text:s text:c="6"/><text:span text:style-name="T24">Desarrollo de proyecto en el mercado energético con Angular 19, Tailwind, PrimeNg, programación reactiva con señales y RxJS. Aplicando Clean Code y principios SOLID en el desarrollo. </text:span></text:p>
      <text:p text:style-name="P29"/>
      <text:list text:continue-numbering="true" text:style-name="WWNum6">
        <text:list-item>
          <text:p text:style-name="P30"><text:span text:style-name="T4">Formación y proyectos de desarrollo web [</text:span><text:span text:style-name="T23">04</text:span><text:span text:style-name="T4">/202</text:span><text:span text:style-name="T23">5</text:span><text:span text:style-name="T4"> – </text:span><text:span text:style-name="T22">12/2025</text:span><text:span text:style-name="T4">]</text:span></text:p>
        </text:list-item>
      </text:list>
      <text:p text:style-name="P31"/>
      <text:p text:style-name="P31"><text:tab/><text:tab/><text:span text:style-name="T11">- Actualización de conocimientos a versiones actuales de Angular (v20) y React <text:tab/> <text:s/>moderno, incluyendo patrones de diseño.</text:span></text:p>
      <text:p text:style-name="P32"><text:span text:style-name="T11"/></text:p>
      <text:p text:style-name="P32"><text:tab/><text:tab/>- Desarrollo de proyectos prácticos y aplicaciones de ejemplo para reforzar <text:tab/><text:tab/> <text:s/>habilidades en entornos modernos de programación.</text:p>
      <text:p text:style-name="P32"/>
      <text:p text:style-name="P32"><text:tab/><text:tab/>- Período de crecimiento personal y disciplina en el aprendizaje autónomo. </text:p>
      <text:p text:style-name="P33" loext:marker-style-name="T25"/>
      <text:list text:continue-numbering="true" text:style-name="WWNum6">
        <text:list-item>
          <text:p text:style-name="P34"><text:span text:style-name="T4">Alvea Soluc.Tecnológicas – Frontend Developer [10/2023 – </text:span><text:span text:style-name="T26">0</text:span><text:span text:style-name="T27">3</text:span><text:span text:style-name="T26">/2025</text:span><text:span text:style-name="T4">]</text:span></text:p>
        </text:list-item>
      </text:list>
      <text:p text:style-name="P35"/>
      <text:p text:style-name="P36"><text:tab/><text:tab/><text:span text:style-name="T11">Proyecto para las administraciones públicas realizando una serie de </text:span></text:p>
      <text:p text:style-name="P37"><text:tab/><text:tab/>migraciones de aplicaciones existentes a la versión 14 de Angular, así como </text:p>
      <text:p text:style-name="P37"><text:tab/><text:tab/>mejoras en los procesos e inclusión de nuevas funcionalidades. </text:p>
      <text:p text:style-name="P33"/>
      <text:list text:continue-numbering="true" text:style-name="WWNum6">
        <text:list-item>
          <text:p text:style-name="P38"><text:span text:style-name="T28">Tuyú Technologies – Frontend Developer Angular [02/2023 – </text:span><text:span text:style-name="T29">10/2023</text:span><text:span text:style-name="T28">]</text:span><text:span text:style-name="T30">.</text:span></text:p>
        </text:list-item>
      </text:list>
      <text:p text:style-name="P39"><text:span text:style-name="T30"/></text:p>
      <text:p text:style-name="P40"><text:span text:style-name="T30"><text:s text:c="5"/>- <text:s text:c="4"/></text:span><text:span text:style-name="T31">Banco Santander (</text:span><text:span text:style-name="T32">Inmuebles</text:span><text:span text:style-name="T31">): [0</text:span><text:span text:style-name="T33">8</text:span><text:span text:style-name="T31">/2023 – </text:span><text:span text:style-name="T34">10/2023</text:span><text:span text:style-name="T31">]</text:span></text:p>
      <text:p text:style-name="P40"><text:span text:style-name="T31"/></text:p>
      <text:p text:style-name="P40"><text:span text:style-name="T30"><text:s text:c="6"/></text:span><text:span text:style-name="T35">Fase inicial del proyecto. </text:span><text:span text:style-name="T36">Creación de la nueva aplicación de Inmuebles con Angular en su versión 13 y una arquitectura de micro-frontends.</text:span><text:span text:style-name="T37"><text:line-break/></text:span><text:span text:style-name="T36">Pruebas realizadas con Jasmine y Karma, utilizando JSON Server.</text:span></text:p>
      <text:p text:style-name="P41" loext:marker-style-name="T28"/>
      <text:list text:style-name="WWNum9">
        <text:list-item>
          <text:p text:style-name="P42" loext:marker-style-name="T38"><text:span text:style-name="T38">Banco Santander (Recobros de Empresas): [05/2023 – </text:span><text:span text:style-name="T39">10/2023</text:span><text:span text:style-name="T38">]</text:span></text:p>
        </text:list-item>
      </text:list>
      <text:p text:style-name="P43" loext:marker-style-name="T30"/>
      <text:p text:style-name="P44" loext:marker-style-name="T30"><text:span text:style-name="T30">Creación de la aplicación de Recobros empresas, en base a una aplicación existente, con </text:span><text:span text:style-name="T40">adición y </text:span><text:span text:style-name="T30">modificaciones funcional</text:span><text:span text:style-name="T41">es, </text:span><text:span text:style-name="T40">así como</text:span><text:span text:style-name="T30"> </text:span><text:span text:style-name="T41">de </text:span><text:span text:style-name="T30">maquetación.</text:span></text:p>
      <text:p text:style-name="P43" loext:marker-style-name="T30"/>
      <text:p text:style-name="P45" loext:marker-style-name="T30"><text:span text:style-name="T42">Se utilizó</text:span><text:span text:style-name="T30"> Angular en su versión 13 con una arquitectura de micro-frontends, </text:span><text:span text:style-name="T42">y uso de Akita como gestor de estados. </text:span></text:p>
      <text:p text:style-name="P45" loext:marker-style-name="T30"><text:span text:style-name="T30"/></text:p>
      <text:p text:style-name="P45" loext:marker-style-name="T30"><text:span text:style-name="T42">Implementación de pruebas</text:span><text:span text:style-name="T30"> </text:span><text:span text:style-name="T42">automáticas </text:span><text:span text:style-name="T30">con Jasmine y Karma </text:span><text:span text:style-name="T42">y</text:span><text:span text:style-name="T30"> JSON Server.</text:span></text:p>
      <text:p text:style-name="P41" loext:marker-style-name="T28"/>
      <text:list xml:id="list183323429654675" text:continue-numbering="true" text:style-name="WWNum9">
        <text:list-item>
          <text:p text:style-name="P46" loext:marker-style-name="T43"><text:span text:style-name="T38">Banco Santander (proyecto Gravity): <text:s/>[02/2023 - 05/2023]</text:span><text:span text:style-name="T38"/></text:p>
        </text:list-item>
      </text:list>
      <text:p text:style-name="P47" loext:marker-style-name="T28"/>
      <text:p text:style-name="P44" loext:marker-style-name="T30"><text:span text:style-name="T30">Prueba de concepto. Construcción de nueva aplicación para consultar la posición global de clientes de empresa para los clientes de</text:span><text:span text:style-name="T44">l Reino Unido</text:span><text:span text:style-name="T30">.</text:span></text:p>
      <text:p text:style-name="P48" loext:marker-style-name="T30"/>
      <text:p text:style-name="P49" loext:marker-style-name="T30"/>
      <text:p text:style-name="P49" loext:marker-style-name="T30"><text:soft-page-break/></text:p>
      <text:p text:style-name="P44" loext:marker-style-name="T30"><text:span text:style-name="T44">Se utilizó</text:span><text:span text:style-name="T30"> Angular en su versión 14. Pruebas realizadas con Jasmine y Karma, con JSON Server como servidor de Mocks para l</text:span><text:span text:style-name="T45">a prueba de los</text:span><text:span text:style-name="T30"> servicios.</text:span></text:p>
      <text:p text:style-name="P48" loext:marker-style-name="T30"/>
      <text:p text:style-name="P50"/>
      <text:list xml:id="list3488528738" text:style-name="WWNum3">
        <text:list-item>
          <text:p text:style-name="P51">Hasten Group – Frontend Developer Angular [08/2021 - 02/2023] </text:p>
        </text:list-item>
      </text:list>
      <text:p text:style-name="P52" loext:marker-style-name="T28"/>
      <text:list xml:id="list183325406135398" text:continue-list="list183323429654675" text:style-name="WWNum9">
        <text:list-item>
          <text:p text:style-name="P46" loext:marker-style-name="T31"><text:span text:style-name="T31">Segur Caixa (canal asegurador): [08/2021 - 02/2023]</text:span></text:p>
        </text:list-item>
      </text:list>
      <text:p text:style-name="P44"><text:s/></text:p>
      <text:p text:style-name="P53">Construcción del nuevo canal asegurador de Segur Caixa (varias aplicaciones), soporte al análisis para el equipo funcional, creación de pruebas automáticas y revisión de incidencias, así como presentación ante el cliente de los proyectos.</text:p>
      <text:p text:style-name="P54"><text:span text:style-name="T46">Se utilizó Angular en su versión 9. </text:span><text:span text:style-name="T47">Pruebas realizadas con Jasmine y Karma, utilizando ficheros para mocks y node-red como servidor de mocks adicional.</text:span></text:p>
      <text:list text:style-name="WWNum12">
        <text:list-item>
          <text:p text:style-name="P55"><text:span text:style-name="T48">CEO Escapadas por Madrid: [05/2018 - 0</text:span><text:span text:style-name="T49">1</text:span><text:span text:style-name="T48">-202</text:span><text:span text:style-name="T49">5</text:span><text:span text:style-name="T48">]</text:span></text:p>
        </text:list-item>
      </text:list>
      <text:p text:style-name="P56" loext:marker-style-name="T4"/>
      <text:p text:style-name="P57">Creación, acuerdos con las instituciones, redacción, fotografía y seguridad del sitio web <text:span text:style-name="T50">www.escapadaspormadrid.com (</text:span><text:span text:style-name="T51">ya </text:span><text:span text:style-name="T52">no en uso</text:span><text:span text:style-name="T50">)</text:span>, enfocado a la difusión de la historia y patrimonio cultura de Madrid, optimizando contenido mediante arquitectura SEO de tipo SILO.</text:p>
      <text:p text:style-name="P57"/>
      <text:p text:style-name="P27" loext:marker-style-name="T10"><text:s text:c="6"/><text:span text:style-name="T20">Experiencia laboral en entornos bancarios (Cobol / CICS / DB2 y JCL)</text:span><text:span text:style-name="T21">:</text:span> <text:s/></text:p>
      <text:p text:style-name="P58"><text:s/></text:p>
      <text:list text:continue-list="list3488528738" text:style-name="WWNum3">
        <text:list-item>
          <text:p text:style-name="P59" loext:marker-style-name="T43"><text:span text:style-name="T53">Sopra Steria: Ext.</text:span><text:span text:style-name="T54"> datos</text:span><text:span text:style-name="T53"> para migración Banco Popular [11/2017 - 05/2018]</text:span><text:span text:style-name="T38"> </text:span></text:p>
        </text:list-item>
      </text:list>
      <text:p text:style-name="P60">Extracción de datos para la migración del Banco Popular al Santander (en las áreas de Cheques y Transferencias). Realización de análisis, desarrollo de las cadenas y programas para extraer los datos, así como pruebas y documentación. </text:p>
      <text:p text:style-name="P61"/>
      <text:list text:continue-numbering="true" text:style-name="WWNum3">
        <text:list-item>
          <text:p text:style-name="P62">Capgemini <text:s/>[03/2006 – 09/2017] </text:p>
        </text:list-item>
      </text:list>
      <text:p text:style-name="P63">Participación en proyectos en departamentos estratégicos del banco, con roles que abarcan desde Programador Junior hasta Analista Orgánico. </text:p>
      <text:p text:style-name="P63"><text:span text:style-name="T55">I</text:span>mpartición durante tres años de cursos internos para las nuevas incorporaciones para los equipos de Banco Popular (grupos de entre 20 y 30 personas).</text:p>
      <text:list text:continue-list="list183325406135398" text:style-name="WWNum9">
        <text:list-item>
          <text:p text:style-name="P46"><text:span text:style-name="T38">Mantenimiento de Riesgos para Banco Popular [07/2011 - 09/2017]</text:span><text:span text:style-name="T28">. </text:span></text:p>
        </text:list-item>
      </text:list>
      <text:p text:style-name="P64"/>
      <text:p text:style-name="P65">Mantenimiento de Riesgos para el Banco Popular en las áreas de Central de Riesgos, Riesgos Vencidos <text:span text:style-name="T56">y</text:span> Reguladores. Participación en nuevos desarrollos. </text:p>
      <text:p text:style-name="P66"><text:s/></text:p>
      <text:list text:continue-numbering="true" text:style-name="WWNum9">
        <text:list-item>
          <text:p text:style-name="P46"><text:span text:style-name="T38">Mantenimiento Fondos Inversión B</text:span><text:span text:style-name="T57">anco </text:span><text:span text:style-name="T38">Popular [03/2006 - 07/2011]</text:span><text:span text:style-name="T28">.</text:span></text:p>
        </text:list-item>
      </text:list>
      <text:p text:style-name="P67"><text:s/></text:p>
      <text:p text:style-name="P65">Mantenimiento de Fondos de Inversión para Banco Popular. Nuevos desarrollos, soporte a la red del banco y sus dos gestoras de Fondos de Inversión (Popular Gestión y Popular Gestión Privada).</text:p>
      <text:p text:style-name="P65"><text:s/></text:p>
      <text:p text:style-name="P65"/>
      <text:p text:style-name="P65"/>
      <text:p text:style-name="P65"><text:soft-page-break/></text:p>
      <text:list text:continue-numbering="true" text:style-name="WWNum9">
        <text:list-item>
          <text:p text:style-name="P68" loext:marker-style-name="T43"><text:span text:style-name="T38">Proyecto IMV para Banco Popular [07/2003 - 03/2006] </text:span></text:p>
        </text:list-item>
      </text:list>
      <text:p text:style-name="P69">Construcción desde cero de una aplicación para valorar la rentabilidad de las sucursales dentro del grupo Banco Popular. Creación de módulos de acceso a base de datos, petición de índices etc (tanto desarrollo como pruebas). </text:p>
      <text:p text:style-name="P27" loext:marker-style-name="T10"><text:span text:style-name="T58"><text:s text:c="6"/>Experiencia laboral con Visual Basic 6</text:span><text:span text:style-name="T21">:</text:span></text:p>
      <text:p text:style-name="P70" loext:marker-style-name="T25"><text:span text:style-name="T59"/></text:p>
      <text:list text:style-name="WWNum10">
        <text:list-item>
          <text:p text:style-name="P71" loext:marker-style-name="T43"><text:span text:style-name="T53">Neuron SL [04/2002 - 06/2002]</text:span><text:span text:style-name="T28">.</text:span><text:span text:style-name="T38"> </text:span></text:p>
        </text:list-item>
      </text:list>
      <text:p text:style-name="P72"><text:s/></text:p>
      <text:p text:style-name="P65"><text:span text:style-name="T60">Practicas. </text:span>Migración Conta Neuron (Contaplus adaptado a Pymes). </text:p>
      <text:p text:style-name="P73"><text:s/></text:p>
      <text:h text:style-name="P11" text:outline-level="1" loext:marker-style-name="T61"><text:span text:style-name="T10">Idiomas </text:span><text:span text:style-name="T10"/></text:h>
      <text:p text:style-name="P74"><draw:g text:anchor-type="as-char" draw:z-index="4" draw:name="Group 2842" draw:style-name="gr1"><draw:custom-shape draw:name="Shape 3606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11">
        <text:list-item>
          <text:p text:style-name="P75">Español (Nativo) <text:tab/> <text:tab/> <text:tab/> </text:p>
        </text:list-item>
        <text:list-item>
          <text:p text:style-name="P76">Inglés: <text:s/>comprensión y escritura nivel Alto. Conversación nivel Medio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76cm" fo:margin-top="0cm" fo:margin-bottom="0.042cm" style:contextual-spacing="false" fo:line-height="113%" fo:text-align="justify" style:justify-single-word="false" fo:orphans="2" fo:widows="2" fo:text-indent="-0.018cm" style:auto-text-indent="false" style:writing-mode="lr-tb"/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chapter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62626" loext:opacity="100%" style:font-name="Corbel" fo:font-family="Corbel" style:font-family-generic="swiss" style:font-pitch="variable" fo:font-size="14pt" style:font-name-asian="Corbel1" style:font-family-asian="Corbel" style:font-family-generic-asian="system" style:font-pitch-asian="variable" style:font-size-asian="14pt" style:font-name-complex="Corbel1" style:font-family-complex="Corbe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04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262626" loext:opacity="100%" style:font-name="Corbel" fo:font-family="Corbel" style:font-family-generic="swiss" style:font-pitch="variable" fo:font-size="14pt" style:font-name-asian="Corbel1" style:font-family-asian="Corbel" style:font-family-generic-asian="system" style:font-pitch-asian="variable" style:font-size-asian="14pt" style:font-name-complex="Corbel1" style:font-family-complex="Corbel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style:font-name="Calibri2" fo:font-family="Calibri" style:font-family-generic="swiss" style:font-pitch="variable" fo:font-weight="bold" style:font-name-asian="Corbel1" style:font-family-asian="Corbel" style:font-family-generic-asian="system" style:font-pitch-asian="variable" style:font-weight-asian="bold" style:font-name-complex="Corbel1" style:font-family-complex="Corbe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orbe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326cm" fo:margin-bottom="1.27cm" fo:margin-left="3.002cm" fo:margin-right="2.926cm" style:writing-mode="lr-tb" style:layout-grid-color="#c0c0c0" style:layout-grid-lines="27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4</text:page-number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uan Pablo Escorihuela</meta:initial-creator>
    <meta:editing-cycles>434</meta:editing-cycles>
    <meta:print-date>2025-05-02T12:55:00.716389940</meta:print-date>
    <meta:creation-date>2023-03-16T19:47:00</meta:creation-date>
    <dc:date>2026-02-05T18:33:23.199931000</dc:date>
    <meta:editing-duration>PT5H11M43S</meta:editing-duration>
    <meta:generator>LibreOffice/25.8.4.2$MacOSX_AARCH64 LibreOffice_project/290daaa01b999472f0c7a3890eb6a550fd74c6df</meta:generator>
    <meta:printed-by>PDF files</meta:printed-by>
    <meta:document-statistic meta:table-count="1" meta:image-count="1" meta:object-count="0" meta:page-count="4" meta:paragraph-count="94" meta:word-count="932" meta:character-count="6271" meta:non-whitespace-character-count="5323"/>
    <meta:user-defined meta:name="AppVersion">16.0000</meta:user-defined>
    <meta:template xlink:type="simple" xlink:actuate="onRequest" xlink:title="Normal.dotm" xlink:href=""/>
  </office:meta>
</office:document-meta>
</file>